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Times New Roman" svg:font-family="'Times New Roman'" style:font-family-generic="roman"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indent="0.5in" style:auto-text-indent="false"/>
    </style:style>
    <style:style style:name="P3" style:family="paragraph" style:parent-style-name="Standard">
      <style:paragraph-properties fo:text-align="center" style:justify-single-word="false"/>
      <style:text-properties officeooo:paragraph-rsid="0001ecab"/>
    </style:style>
    <style:style style:name="P4" style:family="paragraph" style:parent-style-name="Standard">
      <style:paragraph-properties fo:margin-left="0.5in" fo:text-indent="-0.5in" style:auto-text-indent="false"/>
      <style:text-properties officeooo:paragraph-rsid="0001ecab"/>
    </style:style>
    <style:style style:name="T1"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Kiva Data Requirements for Borrowers and Lenders</text:span></text:p>
      <text:h text:style-name="Heading_20_1" text:outline-level="1">Borrower Data Requirements</text:h>
      <text:p text:style-name="P2">Kiva borrowers need simple, practical information that helps them understand borrowing, request a loan, and monitor repayment. Because the borrower story focuses on a flip-phone embedded device, the system should use low-bandwidth, text-based information instead of image-heavy pages or complex charts. Kiva’s data snapshots are available in compressed CSV or JSON files and include loan, lender, and loan-lender relationship data; Kiva also notes that snapshots can support analysis, visuals, and local data sources (Kiva, 2026a). For borrowers, the system should only store the fields needed for loan status and repayment management.</text:p>
      <text:p text:style-name="P2">The most applicable borrower fields from the CSV data would include loan ID, borrower name, country or region, sector, activity, loan amount, funded amount, repayment interval, term in months, status, use, and description. These fields support the borrower’s main tasks: checking whether the loan is funded, understanding the loan purpose, and tracking repayment. A flip-phone interface should be menu-based, with short options such as “Loan Status,” “Payment Due,” “Loan Details,” “Help,” and “Messages.” The main users would be borrowers, field partners, and Kiva support staff. Design requirements should include low data use, simple language, translation support, privacy protection, offline access to recent information, and confirmation screens before submitting requests.</text:p>
      <text:h text:style-name="Heading_20_1" text:outline-level="1">Borrower Story Review</text:h>
      <text:p text:style-name="P2">I reviewed five borrower requests from Kiva’s lending pages: Rodolfo in Peru needed bakery supplies; Rosa Marysol in Colombia needed a popcorn machine; Productores De Granos Basicos Group in Nicaragua needed agricultural supplies; Ervin in Nicaragua needed support for coffee and corn production; and Virna Yelitza in Colombia needed a smoke extractor hood and <text:soft-page-break/>fan for a restaurant (Kiva, 2026b). These stories show that borrower needs are specific, practical, and connected to business operations. This review changed my assessment by making the “use” field more important. Borrowers should clearly see what the loan is for, how much has been funded, how much remains, and what repayment action is needed. I would not prioritize lender analytics, broad marketplace filters, or partner risk ratings in the embedded borrower interface because those features are more useful to lenders.</text:p>
      <text:h text:style-name="Heading_20_1" text:outline-level="1">Borrower Data Priorities for UI/UX Development</text:h>
      <text:p text:style-name="P2">For an embedded-system wireframe, I would display the borrower’s loan status, amount requested, amount funded, amount remaining, next payment due, repayment progress, loan purpose, sector or activity, field partner contact, and help instructions. These fields are important because they directly support the borrower’s goals. A borrower does not need a complicated dashboard; they need confidence that the loan information is correct and a clear understanding of the next step. The most important screen would be a loan status summary showing whether the loan is pending, fundraising, funded, or in repayment.</text:p>
      <text:h text:style-name="Heading_20_1" text:outline-level="1">Lender Data Requirements</text:h>
      <text:p text:style-name="P2">Kiva lenders need more detailed information because they explore loan requests, compare options, analyze lending activity, and plan how to recycle repaid funds. The lender story describes a cloud application, so the interface can support filters, charts, dashboards, and repayment forecasts. However, Kiva is a nonprofit, so the design should prioritize useful fields instead of storing or displaying unnecessary data. Kiva’s live lending filter suggests important lender data such as category, gender, location, loan length, loan distribution, partner information, risk rating, default rate, profitability, and sort options including recommended, almost funded, ending soon, most recent, trending now, and loan length (Kiva, 2026c).</text:p>
      <text:p text:style-name="P2"><text:soft-page-break/>The most applicable lender fields would include borrower name, country, sector, activity, loan amount, funded amount, amount remaining, repayment term, repayment interval, posted date, funding deadline, partner name, risk rating, default rate, description, borrower gender, and tags. Lenders also need account-level data such as available funds, repayment history, loans funded, countries supported, sectors supported, and expected repayment dates. The cloud interface could include a searchable marketplace, comparison cards, portfolio charts, repayment timelines, and recommendation tools.</text:p>
      <text:p text:style-name="P2">The different users would include individual lenders, lending teams, Kiva administrators, and field partners. Individual lenders need to browse, compare, lend, and track repayments. Lending teams need to view shared impact. Kiva administrators need to monitor platform performance and data quality. Field partners need to update loan and repayment records. Design requirements should include responsive layouts, clear visualizations, fast filtering, secure account access, transparent risk information, and easy repayment forecasting. Overall, the lender system should turn raw lending data into clear decisions by showing who is being supported, what the loan funds, and when money may return for future lending.</text:p>
      <text:p text:style-name="P3"><text:span text:style-name="T1">References</text:span></text:p>
      <text:p text:style-name="P4">Kiva. (2026a). Data snapshots. https://www.kiva.org/build/data-snapshots</text:p>
      <text:p text:style-name="P4">Kiva. (2026b). Make a loan, change a life. https://www.kiva.org/</text:p>
      <text:p text:style-name="P4"><text:span text:style-name="T1">Kiva. (2026c). Loans that change lives. https://www.kiva.org/lend/filt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Times New Roman" svg:font-family="'Times New Roman'" style:font-family-generic="roman"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200%" fo:text-align="start"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in" fo:margin-bottom="0in" style:contextual-spacing="false" fo:line-height="200%" fo:keep-together="always" fo:keep-with-next="always"/>
      <style:text-properties fo:color="#000000" loext:opacity="100%" style:font-name="Calibri" fo:font-family="Calibri" style:font-family-generic="roman" style:font-pitch="variable" fo:font-size="12pt" fo:font-weight="bold" style:font-name-asian="ＭＳ ゴシック" style:font-family-asian="'ＭＳ ゴシック'" style:font-family-generic-asian="system" style:font-pitch-asian="variable" style:font-size-asian="12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in" style:contextual-spacing="true" fo:text-indent="-0.25in" style:auto-text-indent="false"/>
    </style:style>
    <style:style style:name="List_20_3_20__28_WW_29_" style:display-name="List 3 (WW)" style:family="paragraph" style:parent-style-name="Standard">
      <style:paragraph-properties fo:margin-left="0.75in" fo:margin-top="0in" fo:margin-bottom="0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in" style:contextual-spacing="true"/>
    </style:style>
    <style:style style:name="List_20_2" style:display-name="List 2" style:family="paragraph" style:parent-style-name="Standard" style:list-style-name="WWNum2" style:class="list">
      <style:paragraph-properties fo:margin-top="0in" fo:margin-bottom="0in" style:contextual-spacing="true"/>
    </style:style>
    <style:style style:name="List_20_3" style:display-name="List 3" style:family="paragraph" style:parent-style-name="Standard" style:list-style-name="WWNum3" style:class="list">
      <style:paragraph-properties fo:margin-top="0in" fo:margin-bottom="0in" style:contextual-spacing="true"/>
    </style:style>
    <style:style style:name="Numbering_20_1" style:display-name="Numbering 1" style:family="paragraph" style:parent-style-name="Standard" style:list-style-name="WWNum5" style:class="list">
      <style:paragraph-properties fo:margin-top="0in" fo:margin-bottom="0in" style:contextual-spacing="true"/>
    </style:style>
    <style:style style:name="Numbering_20_2" style:display-name="Numbering 2" style:family="paragraph" style:parent-style-name="Standard" style:list-style-name="WWNum6" style:class="list">
      <style:paragraph-properties fo:margin-top="0in" fo:margin-bottom="0in" style:contextual-spacing="true"/>
    </style:style>
    <style:style style:name="Numbering_20_3" style:display-name="Numbering 3" style:family="paragraph" style:parent-style-name="Standard" style:list-style-name="WWNum7" style:class="list">
      <style:paragraph-properties fo:margin-top="0in" fo:margin-bottom="0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2</meta:editing-cycles>
    <meta:creation-date>2013-12-23T23:15:00</meta:creation-date>
    <dc:date>2026-06-18T20:39:31.456810000</dc:date>
    <meta:editing-duration>P11DT1H14M36S</meta:editing-duration>
    <meta:generator>1Doc/1.5.0.$MacOSX_AARCH64 LibreOffice_project/f18819df7036044a2e6bdd6066c92aabef81c661</meta:generator>
    <meta:document-statistic meta:table-count="0" meta:image-count="0" meta:object-count="0" meta:page-count="3" meta:paragraph-count="16" meta:word-count="746" meta:character-count="5326" meta:non-whitespace-character-count="4596"/>
    <meta:user-defined meta:name="AppVersion">14.0000</meta:user-defined>
    <meta:template xlink:type="simple" xlink:actuate="onRequest" xlink:title="Normal.dotm" xlink:href=""/>
  </office:meta>
</office:document-meta>
</file>